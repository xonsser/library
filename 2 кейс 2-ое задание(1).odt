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D0470B0DF9.png" manifest:media-type="image/png"/>
  <manifest:file-entry manifest:full-path="Pictures/1000000100000500000002D0F77C42C3.png" manifest:media-type="image/png"/>
  <manifest:file-entry manifest:full-path="Pictures/1000000100000500000002D0B679A5F9.png" manifest:media-type="image/png"/>
  <manifest:file-entry manifest:full-path="Pictures/1000000100000500000002D0C6773EA2.png" manifest:media-type="image/png"/>
  <manifest:file-entry manifest:full-path="Pictures/1000000000000500000002D04D62F13B.jpg" manifest:media-type="image/jpeg"/>
  <manifest:file-entry manifest:full-path="Pictures/1000000000000500000002D06B1C5EAA.jpg" manifest:media-type="image/jpeg"/>
  <manifest:file-entry manifest:full-path="Pictures/1000000000000500000002D009B59AF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081598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style:writing-mode="lr-tb"/>
      <style:text-properties officeooo:paragraph-rsid="00081598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style:font-name="Times New Roman" fo:font-size="16pt" fo:font-weight="bold" officeooo:paragraph-rsid="00081598" style:font-size-asian="16pt" style:font-weight-asian="bold" style:font-name-complex="Times New Roman1" style:font-size-complex="16pt" style:font-weight-complex="bold"/>
    </style:style>
    <style:style style:name="P4" style:family="paragraph" style:parent-style-name="Text_20_body" style:list-style-name="WWNum2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>
        <style:tab-stops>
          <style:tab-stop style:position="0cm"/>
        </style:tab-stops>
      </style:paragraph-properties>
      <style:text-properties officeooo:paragraph-rsid="00081598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officeooo:paragraph-rsid="00081598"/>
    </style:style>
    <style:style style:name="P6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081598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officeooo:paragraph-rsid="00081598"/>
    </style:style>
    <style:style style:name="T1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2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3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name-complex="Times New Roman1" style:font-size-complex="14pt" style:font-weight-complex="normal"/>
    </style:style>
    <style:style style:name="T4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tyle-asian="normal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Прототип пользовательского интерфейса</text:span></text:p>
      <text:p text:style-name="P6"><text:span text:style-name="T3">Для создания прототипов использовалась платформа Figma. Разработано десять фреймов. Первые два — формы регистрации и входа в аккаунт.</text:span></text:p>
      <text:p text:style-name="P7"><text:span text:style-name="T2">На рисунке 1 представлен экран входа в аккаунт. Содержит два поля: идентификатор (логин / номер читательского билета) и пароль. Ниже расположена кнопка «Войти», в правом верхнем углу — ссылка на регистрацию.</text:span></text:p>
      <text:p text:style-name="P3"><draw:frame draw:style-name="fr3" draw:name="Изображение2" text:anchor-type="char" svg:y="0.002cm" svg:width="17cm" svg:height="9.562cm" draw:z-index="0"><draw:image xlink:href="Pictures/1000000000000500000002D009B59AFC.jpg" xlink:type="simple" xlink:show="embed" xlink:actuate="onLoad" draw:mime-type="image/jpeg"/></draw:frame></text:p>
      <text:p text:style-name="P2"><text:span text:style-name="T3">Рисунок ~ - Вход в аккаунт</text:span></text:p>
      <text:p text:style-name="P1"><text:soft-page-break/><text:span text:style-name="T3">На рисунке 2 изображена форма регистрации. Включает три поля: номер телефона, пароль, подтверждение пароля. Также есть кнопки «Войти» и «Зарегистрироваться».</text:span></text:p>
      <text:p text:style-name="P2"><draw:frame draw:style-name="fr2" draw:name="Изображение1" text:anchor-type="char" svg:x="0cm" svg:y="0.152cm" svg:width="17cm" svg:height="9.562cm" draw:z-index="1"><draw:image xlink:href="Pictures/1000000000000500000002D06B1C5EAA.jpg" xlink:type="simple" xlink:show="embed" xlink:actuate="onLoad" draw:mime-type="image/jpeg"/></draw:frame><text:span text:style-name="T3">Рисунок ~ - Регистрация в аккаунт</text:span></text:p>
      <text:p text:style-name="P6"><text:span text:style-name="T3">После входа в систему в зависимости от роли пользователю доступен один из трёх уровней доступа: читатель (клиент), библиотекарь, администратор.</text:span></text:p>
      <text:p text:style-name="P7"><text:span text:style-name="T2">У читателя доступны два основных раздела: возврат книги и выдача книги (рисунки 3 и 4).</text:span></text:p>
      <text:p text:style-name="P3"><draw:frame draw:style-name="fr1" draw:name="Изображение5" text:anchor-type="char" svg:y="0.002cm" svg:width="17cm" svg:height="9.562cm" draw:z-index="2"><draw:image xlink:href="Pictures/1000000000000500000002D04D62F13B.jpg" xlink:type="simple" xlink:show="embed" xlink:actuate="onLoad" draw:mime-type="image/jpeg"/></draw:frame><text:soft-page-break/></text:p>
      <text:p text:style-name="P3"/>
      <text:p text:style-name="P3"><draw:frame draw:style-name="fr1" draw:name="Изображение6" text:anchor-type="char" svg:y="0.002cm" svg:width="17cm" svg:height="9.562cm" draw:z-index="3"><draw:image xlink:href="Pictures/1000000000000500000002D04D62F13B.jpg" xlink:type="simple" xlink:show="embed" xlink:actuate="onLoad" draw:mime-type="image/jpeg"/></draw:frame></text:p>
      <text:p text:style-name="P6"><text:span text:style-name="T1">Библиотекарь занимается ведением базы данных книг и читателей (рисунки 5 и 6). Доступны операции добавления, изменения и удаления записей.</text:span></text:p>
      <text:p text:style-name="P7"><text:soft-page-break/><text:span text:style-name="T2">Администратор имеет полный доступ ко всем данным.</text:span></text:p>
      <text:p text:style-name="P3"><draw:frame draw:style-name="fr1" draw:name="Изображение7" text:anchor-type="char" svg:y="0.002cm" svg:width="17cm" svg:height="9.562cm" draw:z-index="4"><draw:image xlink:href="Pictures/1000000100000500000002D0C6773EA2.png" xlink:type="simple" xlink:show="embed" xlink:actuate="onLoad" draw:mime-type="image/png"/></draw:frame></text:p>
      <text:p text:style-name="P3"/>
      <text:p text:style-name="P3"><draw:frame draw:style-name="fr1" draw:name="Изображение8" text:anchor-type="char" svg:y="0.002cm" svg:width="17cm" svg:height="9.562cm" draw:z-index="5"><draw:image xlink:href="Pictures/1000000100000500000002D0B679A5F9.png" xlink:type="simple" xlink:show="embed" xlink:actuate="onLoad" draw:mime-type="image/png"/></draw:frame></text:p>
      <text:p text:style-name="P3"><draw:frame draw:style-name="fr1" draw:name="Изображение9" text:anchor-type="char" svg:y="0.002cm" svg:width="17cm" svg:height="9.562cm" draw:z-index="6"><draw:image xlink:href="Pictures/1000000100000500000002D0F77C42C3.png" xlink:type="simple" xlink:show="embed" xlink:actuate="onLoad" draw:mime-type="image/png"/></draw:frame></text:p>
      <text:p text:style-name="P3"><text:soft-page-break/></text:p>
      <text:p text:style-name="P3"><draw:frame draw:style-name="fr1" draw:name="Изображение10" text:anchor-type="char" svg:y="0.002cm" svg:width="17cm" svg:height="9.562cm" draw:z-index="7"><draw:image xlink:href="Pictures/1000000100000500000002D0470B0DF9.png" xlink:type="simple" xlink:show="embed" xlink:actuate="onLoad" draw:mime-type="image/png"/></draw:frame></text:p>
      <text:p text:style-name="P6"><text:span text:style-name="T1">В рамках тестирования прототипа библиотечной системы методом «чёрного ящика» разработаны шесть сценариев для сбора обратной связи от потенциальных пользователей (библиотекарей и администраторов).</text:span></text:p>
      <text:list text:style-name="WWNum23">
        <text:list-item>
          <text:p text:style-name="P4"><text:span text:style-name="Strong_20_Emphasis"><text:span text:style-name="T1">Авторизация </text:span></text:span><text:span text:style-name="T1">— корректный вход, переход на главный экран; неверный пароль → сообщение об ошибке.</text:span></text:p>
        </text:list-item>
        <text:list-item>
          <text:p text:style-name="P4"><text:span text:style-name="Strong_20_Emphasis"><text:span text:style-name="T1">Выдача книги </text:span></text:span><text:span text:style-name="T1">— выбор книги, выбор клиента, подтверждение → книга помечается как выданная.</text:span></text:p>
        </text:list-item>
        <text:list-item>
          <text:p text:style-name="P4"><text:span text:style-name="Strong_20_Emphasis"><text:span text:style-name="T1">Поиск по названию </text:span></text:span><text:span text:style-name="T1">— ввод названия, отображение списка с кнопкой «Выбрать».</text:span></text:p>
        </text:list-item>
        <text:list-item>
          <text:p text:style-name="P4"><text:span text:style-name="Strong_20_Emphasis"><text:span text:style-name="T1">Добавление клиента </text:span></text:span><text:span text:style-name="T1">— заполнение ФИО, нажатие «Добавить» → автоматическое присвоение идентификатора.</text:span></text:p>
        </text:list-item>
        <text:list-item>
          <text:p text:style-name="P4"><text:span text:style-name="Strong_20_Emphasis"><text:span text:style-name="T1">Добавление должности сотрудника </text:span></text:span><text:span text:style-name="T1">— ввод названия должности, после сохранения появление в общем списке.</text:span></text:p>
        </text:list-item>
        <text:list-item>
          <text:p text:style-name="P4"><text:span text:style-name="Strong_20_Emphasis"><text:span text:style-name="T1">Возврат книги </text:span></text:span><text:span text:style-name="T1">— выбор книги из списка или через поиск, подтверждение → книга освобождается, запись о выдаче закрывается.</text:span></text:p>
        </text:list-item>
      </text:list>
      <text:p text:style-name="P5" loext:marker-style-name="T1"><text:soft-page-break/><text:span text:style-name="T1">После выполнения каждого сценария пользователю задавались вопросы: понятность действий, возникшие трудности, ожидания от названий кнопок и полей. Также предлагалось оценить сценарий по пятибалльной шкале.</text:span></text:p>
      <text:p text:style-name="P5"><text:span text:style-name="T1">Прототип считается успешным, если </text:span><text:span text:style-name="Strong_20_Emphasis"><text:span text:style-name="T1">не менее 80 % сценариев </text:span></text:span><text:span text:style-name="T1">выполнены без подсказок тестировщика, а средняя оценка пользователей составляет </text:span><text:span text:style-name="Strong_20_Emphasis"><text:span text:style-name="T1">не менее 4 баллов</text:span></text:span><text:span text:style-name="T1">. Полученные замечания и оценки фиксировались в отчёте для последующей доработки интерфейс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7T04:17:51.561901182</meta:creation-date>
    <dc:date>2026-05-07T04:19:02.799828821</dc:date>
    <meta:editing-duration>PT1M12S</meta:editing-duration>
    <meta:editing-cycles>1</meta:editing-cycles>
    <meta:generator>LibreOffice/24.2.7.2$Linux_X86_64 LibreOffice_project/420$Build-2</meta:generator>
    <meta:document-statistic meta:table-count="0" meta:image-count="8" meta:object-count="0" meta:page-count="6" meta:paragraph-count="19" meta:word-count="301" meta:character-count="2246" meta:non-whitespace-character-count="1962"/>
  </office:meta>
</office:document-meta>
</file>