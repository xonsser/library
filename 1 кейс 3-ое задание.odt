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8800000159F61A5A5A.jpg" manifest:media-type="image/jpeg"/>
  <manifest:file-entry manifest:full-path="Pictures/100000000000025F00000196721E8656.jpg" manifest:media-type="image/jpeg"/>
  <manifest:file-entry manifest:full-path="Pictures/100000000000014E000000F15CCE0DF0.jpg" manifest:media-type="image/jpeg"/>
  <manifest:file-entry manifest:full-path="Pictures/100000000000021A00000175B869329D.jpg" manifest:media-type="image/jpeg"/>
  <manifest:file-entry manifest:full-path="Pictures/10000000000002080000020024DA9A4F.jpg" manifest:media-type="image/jpeg"/>
  <manifest:file-entry manifest:full-path="Pictures/1000000000000138000001455C24ED8C.jpg" manifest:media-type="image/jpeg"/>
  <manifest:file-entry manifest:full-path="Pictures/100000000000022A000001DE2B5B5D8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fo:background-color="transparent" style:punctuation-wrap="simple" style:writing-mode="lr-tb"/>
      <style:text-properties style:font-name="Times New Roman" fo:font-size="14pt" fo:font-style="normal" fo:font-weight="normal" officeooo:paragraph-rsid="00250f2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punctuation-wrap="simple" style:writing-mode="lr-tb"/>
      <style:text-properties style:font-name="Times New Roman" fo:font-size="14pt" fo:font-style="normal" fo:font-weight="normal" officeooo:paragraph-rsid="00250f2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unctuation-wrap="simple" style:writing-mode="lr-tb"/>
      <style:text-properties style:font-name="Times New Roman" fo:font-size="14pt" officeooo:paragraph-rsid="00250f2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fo:background-color="transparent" style:punctuation-wrap="simple" style:writing-mode="lr-tb"/>
      <style:text-properties fo:font-variant="normal" fo:text-transform="none" style:use-window-font-color="true" loext:opacity="0%" style:font-name="Times New Roman" fo:font-size="14pt" fo:letter-spacing="normal" fo:font-style="normal" fo:font-weight="normal" officeooo:paragraph-rsid="00250f28" fo:background-color="transparent" style:font-size-asian="14pt" style:font-style-asian="normal" style:font-weight-asian="normal" style:font-name-complex="Times New Roman2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fo:font-variant="normal" fo:text-transform="none" fo:color="#0f1115" loext:opacity="100%" style:font-name="Times New Roman" fo:font-size="14pt" fo:letter-spacing="normal" fo:font-style="normal" fo:font-weight="normal" officeooo:paragraph-rsid="00237ff7" style:font-size-asian="14pt" style:font-style-asian="normal" style:font-weight-asian="normal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punctuation-wrap="simple" style:writing-mode="lr-tb"/>
      <style:text-properties style:font-name="Times New Roman" fo:font-size="14pt" officeooo:paragraph-rsid="00250f2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fo:background-color="transparent" style:punctuation-wrap="simple" style:writing-mode="lr-tb"/>
      <style:text-properties style:font-name="Times New Roman" fo:font-size="14pt" officeooo:paragraph-rsid="00250f2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variant="normal" fo:text-transform="none" fo:color="#0f1115" loext:opacity="100%" fo:letter-spacing="normal" fo:font-style="normal" fo:font-weight="bold" style:font-style-asian="normal" style:font-weight-asian="bold" style:font-name-complex="Times New Roman2" style:font-weight-complex="bold"/>
    </style:style>
    <style:style style:name="T2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style-asian="normal" style:font-weight-asian="normal" style:font-name-complex="Times New Roman2" style:font-style-complex="normal" style:font-weight-complex="normal"/>
    </style:style>
    <style:style style:name="T3" style:family="text">
      <style:text-properties fo:font-variant="normal" fo:text-transform="none" fo:color="#000000" loext:opacity="100%" fo:letter-spacing="normal" fo:background-color="transparent" loext:char-shading-value="0" style:font-name-complex="Times New Roman2"/>
    </style:style>
    <style:style style:name="T4" style:family="text">
      <style:text-properties fo:font-variant="normal" fo:text-transform="none" fo:color="#000000" loext:opacity="100%" fo:letter-spacing="normal" officeooo:rsid="00216187" fo:background-color="transparent" loext:char-shading-value="0" style:font-name-complex="Times New Roman2"/>
    </style:style>
    <style:style style:name="T5" style:family="text">
      <style:text-properties fo:font-variant="normal" fo:text-transform="none" fo:color="#000000" loext:opacity="100%" fo:letter-spacing="normal" officeooo:rsid="00218aa1" fo:background-color="transparent" loext:char-shading-value="0" style:font-name-complex="Times New Roman2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218aa1"/>
    </style:style>
    <style:style style:name="T8" style:family="text">
      <style:text-properties fo:color="#000000" loext:opacity="100%" officeooo:rsid="00216187"/>
    </style:style>
    <style:style style:name="T9" style:family="text">
      <style:text-properties fo:color="#000000" loext:opacity="100%" fo:font-style="normal" fo:font-weight="normal" officeooo:rsid="0021618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Визуальное_моделирование_в_UML"/><text:span text:style-name="T1">Визуальное моделирование в UML</text:span><text:bookmark-end text:name="Визуальное_моделирование_в_UML"/></text:p>
      <text:p text:style-name="P6"><text:span text:style-name="T2">В рамках учебной практики разрабатывается проект информационной системы для автоматизации работы библиотеки. Основными пользователями системы выступают клиенты, библиотекари и администраторы. Клиент может зарегистрироваться в системе, предварительно введя свой идентификатор, после чего он получает возможность выбрать книгу для выдачи или вернуть ранее взятую книгу. Библиотекарь выполняет непосредственные операции по выдаче и возврату книг, а также проверяет учёт книжного фонда в ходе инвентаризации. Администратор обладает расширенными полномочиями: он управляет базами данных должностей сотрудников, ведёт справочник сотрудников библиотеки и редактирует данные клиентов. Все перечисленные функции тесно связаны между собой, причём операция выдачи книги включает в себя проверку наличия экземпляра и автоматическое добавление долга на идентификатор читателя. На </text:span><text:span text:style-name="Strong_20_Emphasis"><text:span text:style-name="T2">рисунке 7</text:span></text:span><text:span text:style-name="T2"> представлена диаграмма вариантов использования, которая наглядно иллюстрирует описанные роли и их взаимодействие с системой.</text:span></text:p>
      <text:p text:style-name="P1"><text:span text:style-name="T3"/></text:p>
      <text:p text:style-name="P2"><draw:frame draw:style-name="fr2" draw:name="Изображение14" text:anchor-type="char" svg:y="0.002cm" svg:width="14.658cm" svg:height="12.647cm" draw:z-index="0"><draw:image xlink:href="Pictures/100000000000022A000001DE2B5B5D87.jpg" xlink:type="simple" xlink:show="embed" xlink:actuate="onLoad" draw:mime-type="image/jpeg"/></draw:frame><text:soft-page-break/><text:span text:style-name="T3">Рисунок </text:span><text:span text:style-name="T4">7 - <text:s/>Диаграмма вариантов использования</text:span></text:p>
      <text:p text:style-name="P7"><text:span text:style-name="T2">Статическая структура системы представлена такими сущностями, как сотрудники, клиенты, должности и книги. Каждый сотрудник имеет уникальный идентификатор, имя, фамилию, отчество и ссылку на занимаемую должность. Для сотрудников предусмотрены методы найма, увольнения и редактирования личных данных. Клиенты, в свою очередь, также обладают идентификатором и полным именем, а их учётные записи можно добавлять, удалять или изменять. Должности хранят название и позволяют выполнять типовые операции управления справочником. Книги характеризуются названием и идентификатором клиента, что служит указанием на текущего держателя экземпляра, а также содержат методы редактирования, удаления и добавления новых записей в фонд. Между классами сотрудников и клиентов прослеживается отношение абстракции, что даёт возможность рассматривать их как обобщённых пользователей библиотеки. Соответствующая диаграмма классов приведена на </text:span><text:span text:style-name="Strong_20_Emphasis"><text:span text:style-name="T2">рисунке 8</text:span></text:span><text:span text:style-name="T2">.</text:span></text:p>
      <text:p text:style-name="P1"><text:soft-page-break/><text:span text:style-name="T3"/></text:p>
      <text:p text:style-name="P2"><draw:frame draw:style-name="fr2" draw:name="Изображение15" text:anchor-type="char" svg:y="0.002cm" svg:width="8.255cm" svg:height="8.599cm" draw:z-index="1"><draw:image xlink:href="Pictures/1000000000000138000001455C24ED8C.jpg" xlink:type="simple" xlink:show="embed" xlink:actuate="onLoad" draw:mime-type="image/jpeg"/></draw:frame><text:span text:style-name="T3">Рисунок </text:span><text:span text:style-name="T5">8</text:span><text:span text:style-name="T4"> - <text:s/>Диаграмма <text:s/>классов</text:span></text:p>
      <text:p text:style-name="P7"><text:span text:style-name="T2">Взаимодействие клиента с системой при выдаче книги прослеживается пошагово. Клиент инициирует вход, после чего система проверяет существование учётной записи. Если аккаунт не найден, доступ отклоняется, а при успешной авторизации клиент переходит к выбору конкретного издания. Система запрашивает статус книги: если она уже выдана другому читателю, клиент получает соответствующее уведомление и ему предлагается сначала вернуть взятую ранее книгу. Только когда экземпляр числится в наличии, система оформляет выдачу и фиксирует её в базе данных. Такой порядок исключает конфликтные ситуации, когда один экземпляр пытаются выдать нескольким читателям одновременно. Детали этого обмена сообщениями между объектами системы отражены на диаграмме последовательностей, показанной на </text:span><text:span text:style-name="Strong_20_Emphasis"><text:span text:style-name="T2">рисунке 9</text:span></text:span><text:span text:style-name="T2">.</text:span></text:p>
      <text:p text:style-name="P1"><text:span text:style-name="T3"/></text:p>
      <text:p text:style-name="P1"/>
      <text:p text:style-name="P2"><draw:frame draw:style-name="fr2" draw:name="Изображение16" text:anchor-type="char" svg:y="0.002cm" svg:width="14.235cm" svg:height="9.869cm" draw:z-index="2"><draw:image xlink:href="Pictures/100000000000021A00000175B869329D.jpg" xlink:type="simple" xlink:show="embed" xlink:actuate="onLoad" draw:mime-type="image/jpeg"/></draw:frame><text:soft-page-break/><text:span text:style-name="T3">Рисунок </text:span><text:span text:style-name="T5">9</text:span><text:span text:style-name="T4"> - <text:s/>Диаграмма последовательностей</text:span></text:p>
      <text:p text:style-name="P7"><text:span text:style-name="T2">Бизнес-процесс выдачи книги содержит ветвления, зависящие от доступности экземпляра. После авторизации клиент выбирает книгу и подтверждает свой выбор. Затем система проверяет, присутствует ли данная книга в фонде. Если книга есть в наличии, то на аутентификатор клиента записывается долг – фактически формируется запись о выдаче, после чего клиенту остаётся только забрать книгу. Если же книга отсутствует, система предлагает клиенту выбрать другое издание, и процесс возвращается к этапу выбора. Таким образом, клиент не может завершить операцию, пока не найдёт доступную книгу либо не прервёт сеанс. Альтернативный взгляд на этот же процесс с акцентом на возможные состояния и переходы между ними представлен на </text:span><text:span text:style-name="Strong_20_Emphasis"><text:span text:style-name="T2">рисунке 10</text:span></text:span><text:span text:style-name="T2">, где изображена диаграмма состояний, дополняющая понимание логики работы системы.</text:span></text:p>
      <text:p text:style-name="P1"/>
      <text:p text:style-name="P2"><draw:frame draw:style-name="fr2" draw:name="Изображение17" text:anchor-type="char" svg:y="0.002cm" svg:width="13.758cm" svg:height="13.547cm" draw:z-index="3"><draw:image xlink:href="Pictures/10000000000002080000020024DA9A4F.jpg" xlink:type="simple" xlink:show="embed" xlink:actuate="onLoad" draw:mime-type="image/jpeg"/></draw:frame><text:soft-page-break/><text:span text:style-name="T3">Рисунок </text:span><text:span text:style-name="T5">10</text:span><text:span text:style-name="T4"> - <text:s/>Диаграмма последовательностей</text:span></text:p>
      <text:p text:style-name="P7"><text:span text:style-name="T2">Физическое развёртывание системы предполагает три основных узла: рабочую станцию библиотекаря, сервер приложения и сервер базы данных. На рабочей станции установлено исполняемое приложение Library.exe и драйвер сканера штрих-кодов ScannerDriver.dll, что позволяет сотруднику быстро считывать информацию с книг и читательских билетов. Сервер приложения содержит скомпилированный программный код на языке C++ (главный модуль main.cpp), а также библиотеку классов, реализующих бизнес-логику: расчёт долгов, проверку доступности книг, формирование отчётов. Сервер базы данных работает под управлением MySQL и хранит все сведения о книжном фонде, клиентах, сотрудниках и выдачах. Все три узла связаны сетью, что обеспечивает слаженную работу клиентских мест и централизованное хранение данных. Данная конфигурация проиллюстрирована на </text:span><text:span text:style-name="Strong_20_Emphasis"><text:span text:style-name="T2">рисунке 11</text:span></text:span><text:span text:style-name="T2"> в виде диаграммы развёртывания.</text:span></text:p>
      <text:p text:style-name="P4"><text:soft-page-break/></text:p>
      <text:p text:style-name="P2"><draw:frame draw:style-name="fr2" draw:name="Изображение18" text:anchor-type="char" svg:y="0.002cm" svg:width="8.837cm" svg:height="6.376cm" draw:z-index="4"><draw:image xlink:href="Pictures/100000000000014E000000F15CCE0DF0.jpg" xlink:type="simple" xlink:show="embed" xlink:actuate="onLoad" draw:mime-type="image/jpeg"/></draw:frame><text:span text:style-name="T3">Рисунок </text:span><text:span text:style-name="T5">11</text:span><text:span text:style-name="T4"> - <text:s/>Диаграмма последовательностей</text:span></text:p>
      <text:p text:style-name="P7"><text:span text:style-name="T2">Логическая структура модели разделена на несколько пакетов. Пакет, объединяющий сотрудников и их должности, имеет право доступа к пакетам клиентов и книг. Это означает, что при работе с сотрудниками система может обращаться к данным читателей и книг – например, для формирования статистики по выдачам на каждого библиотекаря. Такое разделение упрощает поддержку и дальнейшее расширение системы, позволяя независимо изменять функционал, связанный с учётом кадров, читателей и книжного фонда. Пакетная диаграмма, отражающая эту архитектуру, приведена на </text:span><text:span text:style-name="Strong_20_Emphasis"><text:span text:style-name="T2">рисунке 12</text:span></text:span><text:span text:style-name="T2">.</text:span></text:p>
      <text:p text:style-name="P2"><draw:frame draw:style-name="fr1" draw:name="Изображение19" text:anchor-type="char" svg:y="0.002cm" svg:width="16.06cm" svg:height="10.742cm" draw:z-index="5"><draw:image xlink:href="Pictures/100000000000025F00000196721E8656.jpg" xlink:type="simple" xlink:show="embed" xlink:actuate="onLoad" draw:mime-type="image/jpeg"/></draw:frame><text:soft-page-break/><text:span text:style-name="T6">Рисунок </text:span><text:span text:style-name="T7">12</text:span><text:span text:style-name="T8"> - <text:s/>Диаграмма последовательностей</text:span></text:p>
      <text:p text:style-name="P7"><text:span text:style-name="Strong_20_Emphasis"><text:span text:style-name="T9">Обобщённая схема потоков данных</text:span></text:span><text:span text:style-name="T9"> между основными компонентами системы показывает, как запрос от рабочей станции через сервер приложения достигает базы данных и возвращается с результатом. Клиент или библиотекарь инициирует действие (например, выдачу книги), сервер приложения выполняет проверку бизнес-правил, обращается к MySQL за подтверждением наличия экземпляра, а затем фиксирует изменения. Этот цикл повторяется при каждой операции. Визуальное представление потоков управления и данных между узлами развёртывания представлено на </text:span><text:span text:style-name="Strong_20_Emphasis"><text:span text:style-name="T9">рисунке 13</text:span></text:span><text:span text:style-name="T9">.</text:span></text:p>
      <text:p text:style-name="P1"><text:span text:style-name="T8"/></text:p>
      <text:p text:style-name="P2"><draw:frame draw:style-name="fr1" draw:name="Изображение20" text:anchor-type="char" svg:y="0.002cm" svg:width="18cm" svg:height="2.843cm" draw:z-index="6"><draw:image xlink:href="Pictures/100000000000088800000159F61A5A5A.jpg" xlink:type="simple" xlink:show="embed" xlink:actuate="onLoad" draw:mime-type="image/jpeg"/></draw:frame><text:span text:style-name="T6">Рисунок </text:span><text:span text:style-name="T7">13</text:span><text:span text:style-name="T8"> - <text:s/>Диаграмма последовательностей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22:51:22.130406893</meta:creation-date>
    <dc:date>2026-05-07T23:38:56.267495468</dc:date>
    <meta:editing-duration>PT1M42S</meta:editing-duration>
    <meta:editing-cycles>4</meta:editing-cycles>
    <meta:generator>LibreOffice/24.2.7.2$Linux_X86_64 LibreOffice_project/420$Build-2</meta:generator>
    <meta:document-statistic meta:table-count="0" meta:image-count="7" meta:object-count="0" meta:page-count="7" meta:paragraph-count="15" meta:word-count="731" meta:character-count="5826" meta:non-whitespace-character-count="5100"/>
  </office:meta>
</office:document-meta>
</file>