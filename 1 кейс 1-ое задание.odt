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207e3a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207e3a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punctuation-wrap="simple" style:writing-mode="lr-tb"/>
      <style:text-properties style:font-name="Times New Roman" fo:font-size="14pt" officeooo:paragraph-rsid="00237ff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font-name="Times New Roman" fo:font-size="14pt" officeooo:paragraph-rsid="00237ff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f1115" loext:opacity="100%" style:font-name="Times New Roman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font-variant="normal" fo:text-transform="none" fo:color="#0f1115" loext:opacity="100%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T3" style:family="text">
      <style:text-properties fo:font-variant="normal" fo:text-transform="none" fo:color="#0f1115" loext:opacity="100%" style:font-name="Times New Roman1" fo:font-size="14pt" fo:letter-spacing="normal" fo:font-style="normal" fo:text-shadow="none" fo:font-weight="normal" style:font-size-asian="14pt" style:font-style-asian="normal" style:font-weight-asian="normal" style:font-size-complex="14pt" style:font-weight-complex="normal"/>
    </style:style>
    <style:style style:name="T4" style:family="text">
      <style:text-properties fo:font-variant="normal" fo:text-transform="none" fo:color="#0f1115" loext:opacity="100%" style:font-name="Times New Roman1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0f1115" loext:opacity="100%" fo:letter-spacing="normal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Автоматизация основных операций библиотеки включает учёт фонда, обслуживание читателей, формирование отчётности и контроль задолженностей. В рамках управления фондом выполняются поступление изданий с регистрацией и инвентаризацией, распределение по местам хранения и каталогизация. Каталогизация подразумевает описание изданий с присвоением шифров и индексов. Также обязательной операцией является списание или фиксация утраты экземпляров с соответствующим изменением статуса в системе.</text:span></text:p>
      <text:p text:style-name="P4"><text:span text:style-name="T5">Обслуживание читателей начинается с регистрации новых пользователей, в ходе которой создаётся учётная запись и выдаётся читательский билет. Ключевыми процессами являются выдача изданий (включающая поиск, проверку доступности и оформление) и возврат изданий (приём, проверка состояния, начисление или погашение штрафов). Кроме того, в обслуживание входят продление срока пользования литературой, бронирование экземпляров, а также обработка задолженностей с отправкой уведомлений и применением блокировок.</text:span></text:p>
      <text:p text:style-name="P4">Администрирование и отчётность замыкают цикл управления библиотекой. Сюда относится управление пользователями системы и разграничение их прав. Также эта часть включает ведение справочников (авторы, издатели, тематика, тип документов) и формирование статистики. Статистические отчёты собирают данные по посещаемости, выдачам, списаниям и текущим задолженностям. Все перечисленные процессы детализируются в SADT/IDEF0, DFD и IDEF3-моделях, что соответствует рекомендациям по функциональному моделированию автоматизированных систе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22:51:22.130406893</meta:creation-date>
    <dc:date>2026-05-07T22:19:35.873608906</dc:date>
    <meta:editing-duration>PT1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72" meta:character-count="1518" meta:non-whitespace-character-count="1349"/>
  </office:meta>
</office:document-meta>
</file>