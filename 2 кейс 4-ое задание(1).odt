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cm" fo:margin-left="-0.058cm" fo:margin-top="0cm" fo:margin-bottom="0cm" table:align="left" style:writing-mode="page"/>
    </style:style>
    <style:style style:name="Таблица3.A" style:family="table-column">
      <style:table-column-properties style:column-width="7.922cm"/>
    </style:style>
    <style:style style:name="Таблица3.B" style:family="table-column">
      <style:table-column-properties style:column-width="9.0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49cm" fo:border="0.5pt solid #000000"/>
    </style:style>
    <style:style style:name="Таблица3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Таблица4" style:family="table">
      <style:table-properties style:width="16.679cm" fo:margin-left="-0.058cm" fo:margin-top="0cm" fo:margin-bottom="0cm" table:align="left" style:writing-mode="page"/>
    </style:style>
    <style:style style:name="Таблица4.A" style:family="table-column">
      <style:table-column-properties style:column-width="6.283cm"/>
    </style:style>
    <style:style style:name="Таблица4.B" style:family="table-column">
      <style:table-column-properties style:column-width="10.39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49cm" fo:border="0.5pt solid #000000"/>
    </style:style>
    <style:style style:name="Таблица4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108e5a"/>
    </style:style>
    <style:style style:name="P2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0cm" style:auto-text-indent="false" style:writing-mode="lr-tb"/>
      <style:text-properties officeooo:paragraph-rsid="00108e5a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108e5a"/>
    </style:style>
    <style:style style:name="P4" style:family="paragraph" style:parent-style-name="Heading_20_3">
      <style:paragraph-properties fo:margin-left="0cm" fo:margin-top="0cm" fo:margin-bottom="0cm" style:contextual-spacing="false" fo:line-height="150%" fo:text-align="justify" style:justify-single-word="false" fo:text-indent="0cm" style:auto-text-indent="false" style:writing-mode="lr-tb"/>
      <style:text-properties officeooo:paragraph-rsid="00108e5a"/>
    </style:style>
    <style:style style:name="P5" style:family="paragraph" style:parent-style-name="Heading_20_3">
      <style:paragraph-properties fo:margin-left="0cm" fo:margin-top="0cm" fo:margin-bottom="0cm" style:contextual-spacing="false" fo:line-height="150%" fo:text-align="center" style:justify-single-word="false" fo:text-indent="0cm" style:auto-text-indent="false" style:writing-mode="lr-tb"/>
      <style:text-properties officeooo:paragraph-rsid="00108e5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style:writing-mode="lr-tb"/>
      <style:text-properties officeooo:paragraph-rsid="00108e5a"/>
    </style:style>
    <style:style style:name="P7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officeooo:paragraph-rsid="00108e5a"/>
    </style:style>
    <style:style style:name="P8" style:family="paragraph" style:parent-style-name="Table_20_Heading">
      <style:paragraph-properties fo:margin-top="0cm" fo:margin-bottom="0cm" style:contextual-spacing="false" fo:line-height="100%" fo:text-align="justify" style:justify-single-word="false" style:writing-mode="lr-tb"/>
      <style:text-properties officeooo:paragraph-rsid="00108e5a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WWNum22">
      <style:paragraph-properties fo:margin-left="1.251cm" fo:margin-top="0cm" fo:margin-bottom="0cm" style:contextual-spacing="false" fo:line-height="150%" fo:text-align="justify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0" style:family="paragraph" style:parent-style-name="Text_20_body" style:list-style-name="WWNum4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1" style:family="paragraph" style:parent-style-name="Text_20_body" style:list-style-name="WWNum5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2" style:family="paragraph" style:parent-style-name="Text_20_body" style:list-style-name="WWNum6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3" style:family="paragraph" style:parent-style-name="Text_20_body" style:list-style-name="WWNum7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4" style:family="paragraph" style:parent-style-name="Text_20_body" style:list-style-name="WWNum8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5" style:family="paragraph" style:parent-style-name="Text_20_body" style:list-style-name="WWNum9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6" style:family="paragraph" style:parent-style-name="Text_20_body" style:list-style-name="WWNum10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7" style:family="paragraph" style:parent-style-name="Text_20_body" style:list-style-name="WWNum11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8" style:family="paragraph" style:parent-style-name="Text_20_body" style:list-style-name="WWNum12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39" style:family="paragraph" style:parent-style-name="Text_20_body" style:list-style-name="WWNum13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0" style:family="paragraph" style:parent-style-name="Text_20_body" style:list-style-name="WWNum14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1" style:family="paragraph" style:parent-style-name="Text_20_body" style:list-style-name="WWNum15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2" style:family="paragraph" style:parent-style-name="Text_20_body" style:list-style-name="WWNum16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3" style:family="paragraph" style:parent-style-name="Text_20_body" style:list-style-name="WWNum17">
      <style:paragraph-properties fo:margin-left="1.25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4" style:family="paragraph" style:parent-style-name="Text_20_body" style:list-style-name="WWNum18">
      <style:paragraph-properties fo:margin-left="1.251cm" fo:margin-top="0cm" fo:margin-bottom="0cm" style:contextual-spacing="false" fo:line-height="150%" fo:text-align="justify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5" style:family="paragraph" style:parent-style-name="Text_20_body" style:list-style-name="WWNum19">
      <style:paragraph-properties fo:margin-left="1.251cm" fo:margin-top="0cm" fo:margin-bottom="0cm" style:contextual-spacing="false" fo:line-height="150%" fo:text-align="justify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6" style:family="paragraph" style:parent-style-name="Text_20_body" style:list-style-name="WWNum20">
      <style:paragraph-properties fo:margin-left="1.251cm" fo:margin-top="0cm" fo:margin-bottom="0cm" style:contextual-spacing="false" fo:line-height="150%" fo:text-align="justify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7" style:family="paragraph" style:parent-style-name="Text_20_body" style:list-style-name="WWNum21">
      <style:paragraph-properties fo:margin-left="1.251cm" fo:margin-top="0cm" fo:margin-bottom="0cm" style:contextual-spacing="false" fo:line-height="150%" fo:text-align="justify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08e5a"/>
    </style:style>
    <style:style style:name="P48" style:family="paragraph" style:parent-style-name="Text_20_body" style:list-style-name="WWNum7">
      <style:paragraph-properties fo:margin-left="2.501cm" fo:margin-right="0cm" fo:margin-top="0cm" fo:margin-bottom="0cm" style:contextual-spacing="false" fo:line-height="150%" fo:text-align="justify" style:justify-single-word="false" fo:text-indent="0.751cm" style:auto-text-indent="false" style:writing-mode="lr-tb">
        <style:tab-stops>
          <style:tab-stop style:position="2.501cm"/>
        </style:tab-stops>
      </style:paragraph-properties>
      <style:text-properties officeooo:paragraph-rsid="00108e5a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108e5a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tyle-asian="normal" style:font-weight-asian="bold" style:font-name-complex="Times New Roman1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Документы по проекту и прототипирование</text:span></text:p>
      <text:h text:style-name="P1" text:outline-level="2" loext:marker-style-name="T1"><text:span text:style-name="T1">1. Общие сведения</text:span></text:h>
      <text:h text:style-name="P1" text:outline-level="2"><text:span text:style-name="Strong_20_Emphasis"><text:span text:style-name="T1">Наименование системы</text:span></text:span><text:span text:style-name="T1">: Автоматизированная библиотечная система (АБС)</text:span></text:h>
      <text:h text:style-name="P1" text:outline-level="2"><text:span text:style-name="Strong_20_Emphasis"><text:span text:style-name="T1">Заказчик</text:span></text:span><text:span text:style-name="T1">: (указывается при необходимости)</text:span></text:h>
      <text:h text:style-name="P1" text:outline-level="2"><text:span text:style-name="Strong_20_Emphasis"><text:span text:style-name="T1">Разработчик</text:span></text:span><text:span text:style-name="T1">: (указывается при необходимости)</text:span></text:h>
      <text:h text:style-name="P1" text:outline-level="2"><text:span text:style-name="Strong_20_Emphasis"><text:span text:style-name="T1">Назначение</text:span></text:span><text:span text:style-name="T1">: автоматизация учёта фонда, обслуживания читателей, контроля задолженностей и формирования отчётности.</text:span></text:h>
      <text:h text:style-name="P1" text:outline-level="2" loext:marker-style-name="T1"><text:span text:style-name="T1">2. Цель и назначение системы</text:span></text:h>
      <text:h text:style-name="P3" text:outline-level="3" loext:marker-style-name="T1"><text:span text:style-name="T1">2.1. Цель создания</text:span></text:h>
      <text:p text:style-name="P49" loext:marker-style-name="T1"><text:span text:style-name="T1">Автоматизация основных операций библиотеки:</text:span></text:p>
      <text:list text:style-name="WWNum4">
        <text:list-item>
          <text:p text:style-name="P30" loext:marker-style-name="T1"><text:span text:style-name="T1">ведение электронного каталога изданий;</text:span></text:p>
        </text:list-item>
        <text:list-item>
          <text:p text:style-name="P30" loext:marker-style-name="T1"><text:span text:style-name="T1">учёт выдачи, возврата, продления и бронирования;</text:span></text:p>
        </text:list-item>
        <text:list-item>
          <text:p text:style-name="P30" loext:marker-style-name="T1"><text:span text:style-name="T1">контроль задолженностей и штрафов;</text:span></text:p>
        </text:list-item>
        <text:list-item>
          <text:p text:style-name="P30" loext:marker-style-name="T1"><text:span text:style-name="T1">формирование аналитических отчётов.</text:span></text:p>
        </text:list-item>
      </text:list>
      <text:h text:style-name="P3" text:outline-level="3" loext:marker-style-name="T1"><text:span text:style-name="T1">2.2. Назначение системы</text:span></text:h>
      <text:p text:style-name="P49" loext:marker-style-name="T1"><text:span text:style-name="T1">Система предназначена для:</text:span></text:p>
      <text:list text:style-name="WWNum5">
        <text:list-item>
          <text:p text:style-name="P31" loext:marker-style-name="T1"><text:span text:style-name="T1">библиотекарей (обслуживание читателей, работа с фондом);</text:span></text:p>
        </text:list-item>
        <text:list-item>
          <text:p text:style-name="P31" loext:marker-style-name="T1"><text:span text:style-name="T1">читателей (поиск, продление, бронирование);</text:span></text:p>
        </text:list-item>
        <text:list-item>
          <text:p text:style-name="P31" loext:marker-style-name="T1"><text:span text:style-name="T1">администраторов (настройка прав, справочников);</text:span></text:p>
        </text:list-item>
        <text:list-item>
          <text:p text:style-name="P31" loext:marker-style-name="T1"><text:span text:style-name="T1">руководителей (просмотр отчётности).</text:span></text:p>
        </text:list-item>
      </text:list>
      <text:h text:style-name="P1" text:outline-level="2" loext:marker-style-name="T1"><text:span text:style-name="T1">3. Функциональные требования</text:span></text:h>
      <text:h text:style-name="P3" text:outline-level="3" loext:marker-style-name="T1"><text:span text:style-name="T1">3.1. Управление фондом</text:span></text:h>
      <text:list text:style-name="WWNum6">
        <text:list-item>
          <text:p text:style-name="P32" loext:marker-style-name="T1"><text:span text:style-name="T1">Ведение единого электронного каталога (книги, журналы, электронные ресурсы).</text:span></text:p>
        </text:list-item>
        <text:list-item>
          <text:p text:style-name="P32" loext:marker-style-name="T1"><text:span text:style-name="T1">Регистрация поступлений, массовая загрузка из внешних источников.</text:span></text:p>
        </text:list-item>
        <text:list-item>
          <text:p text:style-name="P32"><text:span text:style-name="T1">Учёт экземпляров с уникальными инвентарными номерами и статусами (</text:span><text:span text:style-name="Source_20_Text"><text:span text:style-name="T1">в наличии</text:span></text:span><text:span text:style-name="T1">, </text:span><text:span text:style-name="Source_20_Text"><text:span text:style-name="T1">выдан</text:span></text:span><text:span text:style-name="T1">, </text:span><text:span text:style-name="Source_20_Text"><text:span text:style-name="T1">утерян</text:span></text:span><text:span text:style-name="T1">, </text:span><text:span text:style-name="Source_20_Text"><text:span text:style-name="T1">списан</text:span></text:span><text:span text:style-name="T1">).</text:span></text:p>
        </text:list-item>
        <text:list-item>
          <text:p text:style-name="P32" loext:marker-style-name="T1"><text:span text:style-name="T1">Операции списания, пометки утерянных/повреждённых.</text:span></text:p>
        </text:list-item>
      </text:list>
      <text:h text:style-name="P3" text:outline-level="3" loext:marker-style-name="T1"><text:soft-page-break/><text:span text:style-name="T1">3.2. Обслуживание читателей</text:span></text:h>
      <text:list text:style-name="WWNum7">
        <text:list-item>
          <text:p text:style-name="P33" loext:marker-style-name="T1"><text:span text:style-name="T1">База читателей (ФИО, статус: активен/заблокирован).</text:span></text:p>
        </text:list-item>
        <text:list-item>
          <text:p text:style-name="P33" loext:marker-style-name="T1"><text:span text:style-name="T1">Выдача и возврат (поддержка нескольких экземпляров, типовых сроков).</text:span></text:p>
        </text:list-item>
        <text:list-item>
          <text:p text:style-name="P33" loext:marker-style-name="T1"><text:span text:style-name="T1">Автоматический контроль:</text:span></text:p>
          <text:list>
            <text:list-item>
              <text:p text:style-name="P48" loext:marker-style-name="T1"><text:span text:style-name="T1">максимального количества одновременно выданных книг;</text:span></text:p>
            </text:list-item>
            <text:list-item>
              <text:p text:style-name="P48" loext:marker-style-name="T1"><text:span text:style-name="T1">просрочек;</text:span></text:p>
            </text:list-item>
            <text:list-item>
              <text:p text:style-name="P48" loext:marker-style-name="T1"><text:span text:style-name="T1">блокировок.</text:span></text:p>
            </text:list-item>
          </text:list>
        </text:list-item>
        <text:list-item>
          <text:p text:style-name="P33" loext:marker-style-name="T1"><text:span text:style-name="T1">Расчёт и учёт штрафов, их погашение.</text:span></text:p>
        </text:list-item>
        <text:list-item>
          <text:p text:style-name="P33" loext:marker-style-name="T1"><text:span text:style-name="T1">Бронирование экземпляров.</text:span></text:p>
        </text:list-item>
        <text:list-item>
          <text:p text:style-name="P33" loext:marker-style-name="T1"><text:span text:style-name="T1">Продление срока пользования с проверкой ограничений.</text:span></text:p>
        </text:list-item>
        <text:list-item>
          <text:p text:style-name="P33" loext:marker-style-name="T1"><text:span text:style-name="T1">Поиск по каталогу: автор, название, тема, ключевые слова, шифр, ISBN.</text:span></text:p>
        </text:list-item>
      </text:list>
      <text:h text:style-name="P3" text:outline-level="3" loext:marker-style-name="T1"><text:span text:style-name="T1">3.3. Отчёты и аналитика</text:span></text:h>
      <text:list text:style-name="WWNum8">
        <text:list-item>
          <text:p text:style-name="P34" loext:marker-style-name="T1"><text:span text:style-name="T1">По фонду: количество, структура, списания.</text:span></text:p>
        </text:list-item>
        <text:list-item>
          <text:p text:style-name="P34" loext:marker-style-name="T1"><text:span text:style-name="T1">По обороту: выдачи за период, наиболее читаемые издания, активность читателей.</text:span></text:p>
        </text:list-item>
        <text:list-item>
          <text:p text:style-name="P34" loext:marker-style-name="T1"><text:span text:style-name="T1">По задолженностям: список должников, размер штрафов.</text:span></text:p>
        </text:list-item>
        <text:list-item>
          <text:p text:style-name="P34" loext:marker-style-name="T1"><text:span text:style-name="T1">Выгрузка в CSV/Excel, PDF.</text:span></text:p>
        </text:list-item>
      </text:list>
      <text:h text:style-name="P3" text:outline-level="3" loext:marker-style-name="T1"><text:span text:style-name="T1">3.4. Администрирование</text:span></text:h>
      <text:list text:style-name="WWNum9">
        <text:list-item>
          <text:p text:style-name="P35" loext:marker-style-name="T1"><text:span text:style-name="T1">Многоуровневая система ролей: администратор, библиотекарь, читатель, руководитель.</text:span></text:p>
        </text:list-item>
        <text:list-item>
          <text:p text:style-name="P35" loext:marker-style-name="T1"><text:span text:style-name="T1">Настройка справочников (типы изданий, отделы, тематики и др.).</text:span></text:p>
        </text:list-item>
        <text:list-item>
          <text:p text:style-name="P35" loext:marker-style-name="T1"><text:span text:style-name="T1">Журналирование действий пользователей.</text:span></text:p>
        </text:list-item>
      </text:list>
      <text:h text:style-name="P1" text:outline-level="2" loext:marker-style-name="T1"><text:span text:style-name="T1">4. Нефункциональные требования</text:span></text:h>
      <text:h text:style-name="P3" text:outline-level="3" loext:marker-style-name="T1"><text:span text:style-name="T1">4.1. Надёжность</text:span></text:h>
      <text:list text:style-name="WWNum10">
        <text:list-item>
          <text:p text:style-name="P36" loext:marker-style-name="T1"><text:span text:style-name="T1">Журналы транзакций.</text:span></text:p>
        </text:list-item>
        <text:list-item>
          <text:p text:style-name="P36" loext:marker-style-name="T1"><text:span text:style-name="T1">Резервное копирование и восстановление БД.</text:span></text:p>
        </text:list-item>
        <text:list-item>
          <text:p text:style-name="P36" loext:marker-style-name="T1"><text:span text:style-name="T1">Обработка ошибочных ситуаций с информированием пользователя.</text:span></text:p>
        </text:list-item>
      </text:list>
      <text:h text:style-name="P3" text:outline-level="3" loext:marker-style-name="T1"><text:soft-page-break/><text:span text:style-name="T1">4.2. Производительность</text:span></text:h>
      <text:list text:style-name="WWNum11">
        <text:list-item>
          <text:p text:style-name="P37"><text:span text:style-name="T1">Время отклика при поиске, выдаче/возврате — не более </text:span><text:span text:style-name="Strong_20_Emphasis"><text:span text:style-name="T1">N секунд</text:span></text:span><text:span text:style-name="T1"> (уточняется в ТЗ на этапе проектирования) при нагрузке до </text:span><text:span text:style-name="Strong_20_Emphasis"><text:span text:style-name="T1">X</text:span></text:span><text:span text:style-name="T1"> одновременных пользователей.</text:span></text:p>
        </text:list-item>
      </text:list>
      <text:h text:style-name="P3" text:outline-level="3" loext:marker-style-name="T1"><text:span text:style-name="T1">4.3. Масштабируемость и переносимость</text:span></text:h>
      <text:list text:style-name="WWNum12">
        <text:list-item>
          <text:p text:style-name="P38" loext:marker-style-name="T1"><text:span text:style-name="T1">Развёртывание в локальной сети учреждения.</text:span></text:p>
        </text:list-item>
        <text:list-item>
          <text:p text:style-name="P38" loext:marker-style-name="T1"><text:span text:style-name="T1">Поддержка выбранной СУБД и ОС (уточняется в разделе «Требования к техническим средствам»).</text:span></text:p>
        </text:list-item>
      </text:list>
      <text:h text:style-name="P3" text:outline-level="3" loext:marker-style-name="T1"><text:span text:style-name="T1">4.4. Безопасность</text:span></text:h>
      <text:list text:style-name="WWNum13">
        <text:list-item>
          <text:p text:style-name="P39" loext:marker-style-name="T1"><text:span text:style-name="T1">Аутентификация пользователей, разграничение прав доступа.</text:span></text:p>
        </text:list-item>
        <text:list-item>
          <text:p text:style-name="P39" loext:marker-style-name="T1"><text:span text:style-name="T1">Хранение и обработка персональных данных по законодательству.</text:span></text:p>
        </text:list-item>
        <text:list-item>
          <text:p text:style-name="P39" loext:marker-style-name="T1"><text:span text:style-name="T1">Шифрование паролей, защищённый доступ к серверу.</text:span></text:p>
        </text:list-item>
      </text:list>
      <text:h text:style-name="P3" text:outline-level="3" loext:marker-style-name="T1"><text:span text:style-name="T1">4.5. Удобство использования (эргономика)</text:span></text:h>
      <text:list text:style-name="WWNum14">
        <text:list-item>
          <text:p text:style-name="P40" loext:marker-style-name="T1"><text:span text:style-name="T1">Интуитивные интерфейсы для библиотекаря и читателя.</text:span></text:p>
        </text:list-item>
        <text:list-item>
          <text:p text:style-name="P40" loext:marker-style-name="T1"><text:span text:style-name="T1">«Горячие клавиши» для массовых операций, понятные сообщения об ошибках.</text:span></text:p>
        </text:list-item>
      </text:list>
      <text:h text:style-name="P3" text:outline-level="3" loext:marker-style-name="T1"><text:span text:style-name="T1">4.6. Сопровождаемость и документированность</text:span></text:h>
      <text:list text:style-name="WWNum15">
        <text:list-item>
          <text:p text:style-name="P41" loext:marker-style-name="T1"><text:span text:style-name="T1">Пользовательская и администраторская документация.</text:span></text:p>
        </text:list-item>
        <text:list-item>
          <text:p text:style-name="P41" loext:marker-style-name="T1"><text:span text:style-name="T1">Логи для анализа ошибок.</text:span></text:p>
        </text:list-item>
      </text:list>
      <text:h text:style-name="P1" text:outline-level="2" loext:marker-style-name="T1"><text:span text:style-name="T1">5. Состав и содержание работ</text:span></text:h>
      <text:list text:style-name="WWNum16">
        <text:list-item>
          <text:p text:style-name="P42" loext:marker-style-name="T1"><text:span text:style-name="T1">Разработка ПО.</text:span></text:p>
        </text:list-item>
        <text:list-item>
          <text:p text:style-name="P42" loext:marker-style-name="T1"><text:span text:style-name="T1">Развёртывание, настройка.</text:span></text:p>
        </text:list-item>
        <text:list-item>
          <text:p text:style-name="P42" loext:marker-style-name="T1"><text:span text:style-name="T1">Тестирование.</text:span></text:p>
        </text:list-item>
        <text:list-item>
          <text:p text:style-name="P42" loext:marker-style-name="T1"><text:span text:style-name="T1">Подготовка документации.</text:span></text:p>
        </text:list-item>
      </text:list>
      <text:h text:style-name="P1" text:outline-level="2" loext:marker-style-name="T1"><text:span text:style-name="T1">6. Порядок контроля и приёмки</text:span></text:h>
      <text:list text:style-name="WWNum17">
        <text:list-item>
          <text:p text:style-name="P43" loext:marker-style-name="T1"><text:span text:style-name="T1">Передача по акту.</text:span></text:p>
        </text:list-item>
        <text:list-item>
          <text:p text:style-name="P43" loext:marker-style-name="T1"><text:span text:style-name="T1">Опытная эксплуатация — 14 дней.</text:span></text:p>
        </text:list-item>
      </text:list>
      <text:h text:style-name="P5" text:outline-level="3" loext:marker-style-name="T1"><text:span text:style-name="T1">Таблица 1 - Выдача издания</text:span>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8" loext:marker-style-name="T2"><text:span text:style-name="T2">Действие</text:span></text:p>
            </table:table-cell>
            <table:table-cell table:style-name="Таблица3.B1" office:value-type="string">
              <text:p text:style-name="P8" loext:marker-style-name="T2"><text:span text:style-name="T2">Система</text:span>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7" loext:marker-style-name="T2"><text:span text:style-name="T2">Читатель/библиотекарь находит издание в каталоге</text:span></text:p>
          </table:table-cell>
          <table:table-cell table:style-name="Таблица3.B2" office:value-type="string">
            <text:p text:style-name="P7" loext:marker-style-name="T2"><text:span text:style-name="T2">Отображает статус экземпляров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 loext:marker-style-name="T2"><text:span text:style-name="T2">Библиотекарь выбирает выдачу</text:span></text:p>
          </table:table-cell>
          <table:table-cell table:style-name="Таблица3.B2" office:value-type="string">
            <text:p text:style-name="P7" loext:marker-style-name="T2"><text:span text:style-name="T2">Проверяет максимальное количество, блокировку, наличие</text:span></text:p>
          </table:table-cell>
        </table:table-row>
        <table:table-row table:style-name="Таблица3.1">
          <table:table-cell table:style-name="Таблица3.A2" office:value-type="string">
            <text:p text:style-name="P7" loext:marker-style-name="T2"><text:span text:style-name="T2">Подтверждает выдачу</text:span></text:p>
          </table:table-cell>
          <table:table-cell table:style-name="Таблица3.B2" office:value-type="string">
            <text:p text:style-name="P7" loext:marker-style-name="T2"><text:span text:style-name="T2">Обновляет статус экземпляра, фиксирует срок возврата</text:span></text:p>
          </table:table-cell>
        </table:table-row>
      </table:table>
      <text:h text:style-name="P5" text:outline-level="3" loext:marker-style-name="T1"><text:span text:style-name="T1">Таблиц 2 - Возврат издания</text:span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8" loext:marker-style-name="T2"><text:span text:style-name="T2">Действие</text:span></text:p>
            </table:table-cell>
            <table:table-cell table:style-name="Таблица4.B1" office:value-type="string">
              <text:p text:style-name="P8" loext:marker-style-name="T2"><text:span text:style-name="T2">Система</text:span>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7" loext:marker-style-name="T2"><text:span text:style-name="T2">Библиотекарь принимает издание</text:span></text:p>
          </table:table-cell>
          <table:table-cell table:style-name="Таблица4.B2" office:value-type="string">
            <text:p text:style-name="P7" loext:marker-style-name="T2"><text:span text:style-name="T2">Проверяет срок возврата</text:span></text:p>
          </table:table-cell>
        </table:table-row>
        <table:table-row table:style-name="Таблица4.1">
          <table:table-cell table:style-name="Таблица4.A2" office:value-type="string">
            <text:p text:style-name="P7" loext:marker-style-name="T2"><text:span text:style-name="T2">-</text:span></text:p>
          </table:table-cell>
          <table:table-cell table:style-name="Таблица4.B2" office:value-type="string">
            <text:p text:style-name="P7" loext:marker-style-name="T2"><text:span text:style-name="T2">Начисляет штраф при просрочке</text:span></text:p>
          </table:table-cell>
        </table:table-row>
        <table:table-row table:style-name="Таблица4.1">
          <table:table-cell table:style-name="Таблица4.A2" office:value-type="string">
            <text:p text:style-name="P7" loext:marker-style-name="T2"><text:span text:style-name="T2">-</text:span></text:p>
          </table:table-cell>
          <table:table-cell table:style-name="Таблица4.B2" office:value-type="string">
            <text:p text:style-name="P7"><text:span text:style-name="T2">Обновляет статус экземпляра на </text:span><text:span text:style-name="Source_20_Text"><text:span text:style-name="T2">в наличии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7" loext:marker-style-name="T2"><text:span text:style-name="T2">-</text:span></text:p>
          </table:table-cell>
          <table:table-cell table:style-name="Таблица4.B2" office:value-type="string">
            <text:p text:style-name="P7" loext:marker-style-name="T2"><text:span text:style-name="T2">При бронировании — уведомляет следующего читателя</text:span></text:p>
          </table:table-cell>
        </table:table-row>
      </table:table>
      <text:h text:style-name="P4" text:outline-level="3" loext:marker-style-name="T1"><text:span text:style-name="T1">Сценарий 3. Продление и бронирование</text:span></text:h>
      <text:list text:style-name="WWNum18">
        <text:list-item>
          <text:p text:style-name="P44"><text:span text:style-name="Strong_20_Emphasis"><text:span text:style-name="T1">Читатель</text:span></text:span><text:span text:style-name="T1"> (в личном кабинете или через библиотекаря) запрашивает продление.</text:span></text:p>
        </text:list-item>
        <text:list-item>
          <text:p text:style-name="P44"><text:span text:style-name="Strong_20_Emphasis"><text:span text:style-name="T1">Система</text:span></text:span><text:span text:style-name="T1"> проверяет: нет просрочек, блокировок, есть ли бронь.</text:span></text:p>
        </text:list-item>
        <text:list-item>
          <text:p text:style-name="P44" loext:marker-style-name="T1"><text:span text:style-name="T1">При возможности — продлевает срок.</text:span></text:p>
        </text:list-item>
      </text:list>
      <text:h text:style-name="P4" text:outline-level="3" loext:marker-style-name="T1"><text:span text:style-name="T1">Сценарий 4. Управление задолженностью</text:span></text:h>
      <text:list text:style-name="WWNum19">
        <text:list-item>
          <text:p text:style-name="P45" loext:marker-style-name="T1"><text:span text:style-name="T1">При возврате с просрочкой — автоматический расчёт штрафа.</text:span></text:p>
        </text:list-item>
        <text:list-item>
          <text:p text:style-name="P45" loext:marker-style-name="T1"><text:span text:style-name="T1">Непогашенная задолженность → блокировка выдачи.</text:span></text:p>
        </text:list-item>
        <text:list-item>
          <text:p text:style-name="P45" loext:marker-style-name="T1"><text:span text:style-name="T1">Погашение → разблокировка.</text:span></text:p>
        </text:list-item>
      </text:list>
      <text:h text:style-name="P2" text:outline-level="2" loext:marker-style-name="T1"><text:span text:style-name="T1">2. Описание интерфейсов (по ролям)</text:span></text:h>
      <text:h text:style-name="P4" text:outline-level="3" loext:marker-style-name="T1"><text:span text:style-name="T1">2.1. Интерфейс библиотекаря</text:span></text:h>
      <text:list text:style-name="WWNum20">
        <text:list-item>
          <text:p text:style-name="P46"><text:span text:style-name="Strong_20_Emphasis"><text:span text:style-name="T1">Главный экран</text:span></text:span><text:span text:style-name="T1">: поисковая строка (автор, название, ISBN, ключевые слова), кнопки «Выдача», «Возврат», «Читатели».</text:span></text:p>
        </text:list-item>
        <text:list-item>
          <text:p text:style-name="P46"><text:span text:style-name="Strong_20_Emphasis"><text:span text:style-name="T1">Выдача</text:span></text:span><text:span text:style-name="T1">: поле ввода/сканирования штрихкода читателя и книги → отображение ограничений → кнопка «Оформить».</text:span></text:p>
        </text:list-item>
        <text:list-item>
          <text:p text:style-name="P46"><text:span text:style-name="Strong_20_Emphasis"><text:span text:style-name="T1">Возврат</text:span></text:span><text:span text:style-name="T1">: список выданных книг у читателя → выбор → кнопка «Принять».</text:span></text:p>
        </text:list-item>
        <text:list-item>
          <text:p text:style-name="P46"><text:span text:style-name="Strong_20_Emphasis"><text:span text:style-name="T1">Читатели</text:span></text:span><text:span text:style-name="T1">: добавление, редактирование, блокировка, просмотр задолженностей.</text:span></text:p>
        </text:list-item>
        <text:list-item>
          <text:p text:style-name="P46"><text:span text:style-name="Strong_20_Emphasis"><text:span text:style-name="T1">Отчёты</text:span></text:span><text:span text:style-name="T1">: выбор типа отчёта + период → кнопка «Сформировать» → выгрузка.</text:span></text:p>
        </text:list-item>
      </text:list>
      <text:h text:style-name="P4" text:outline-level="3" loext:marker-style-name="T1"><text:soft-page-break/><text:span text:style-name="T1">2.2. Интерфейс читателя (личный кабинет)</text:span></text:h>
      <text:list text:style-name="WWNum21">
        <text:list-item>
          <text:p text:style-name="P47"><text:span text:style-name="Strong_20_Emphasis"><text:span text:style-name="T1">Поиск</text:span></text:span><text:span text:style-name="T1"> по каталогу.</text:span></text:p>
        </text:list-item>
        <text:list-item>
          <text:p text:style-name="P47"><text:span text:style-name="Strong_20_Emphasis"><text:span text:style-name="T1">Мои книги</text:span></text:span><text:span text:style-name="T1">: список выданных, сроки возврата.</text:span></text:p>
        </text:list-item>
        <text:list-item>
          <text:p text:style-name="P47"><text:span text:style-name="Strong_20_Emphasis"><text:span text:style-name="T1">Продлить</text:span></text:span><text:span text:style-name="T1"> (если возможно).</text:span></text:p>
        </text:list-item>
        <text:list-item>
          <text:p text:style-name="P47"><text:span text:style-name="Strong_20_Emphasis"><text:span text:style-name="T1">Забронировать</text:span></text:span><text:span text:style-name="T1"> (если есть копии).</text:span></text:p>
        </text:list-item>
        <text:list-item>
          <text:p text:style-name="P47"><text:span text:style-name="Strong_20_Emphasis"><text:span text:style-name="T1">Задолженности</text:span></text:span><text:span text:style-name="T1"> (сумма штрафа, кнопка «Оплатить» в системе учёта).</text:span></text:p>
        </text:list-item>
      </text:list>
      <text:h text:style-name="P4" text:outline-level="3" loext:marker-style-name="T1"><text:span text:style-name="T1">2.3. Интерфейс администратора</text:span></text:h>
      <text:list text:style-name="WWNum22">
        <text:list-item>
          <text:p text:style-name="P29"><text:span text:style-name="Strong_20_Emphasis"><text:span text:style-name="T1">Справочники</text:span></text:span><text:span text:style-name="T1">: типы изданий, отделы, тематики, издатели.</text:span></text:p>
        </text:list-item>
        <text:list-item>
          <text:p text:style-name="P29"><text:span text:style-name="Strong_20_Emphasis"><text:span text:style-name="T1">Пользователи</text:span></text:span><text:span text:style-name="T1">: создание, роли, сброс паролей.</text:span></text:p>
        </text:list-item>
        <text:list-item>
          <text:p text:style-name="P29"><text:span text:style-name="Strong_20_Emphasis"><text:span text:style-name="T1">Журнал операций</text:span></text:span><text:span text:style-name="T1">: фильтр по дате, пользователю, действию.</text:span></text:p>
        </text:list-item>
        <text:list-item>
          <text:p text:style-name="P29"><text:span text:style-name="Strong_20_Emphasis"><text:span text:style-name="T1">Бэкап БД</text:span></text:span><text:span text:style-name="T1"> (кнопка резервного копирования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1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7:32:07.065709043</meta:creation-date>
    <dc:date>2026-05-07T04:20:35.974471162</dc:date>
    <meta:editing-duration>PT50M34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5" meta:paragraph-count="119" meta:word-count="650" meta:character-count="4999" meta:non-whitespace-character-count="4531"/>
  </office:meta>
</office:document-meta>
</file>