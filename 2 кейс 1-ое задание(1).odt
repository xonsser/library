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207e3a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207e3a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font-variant="normal" fo:text-transform="none" fo:color="#0f1115" loext:opacity="100%" style:font-name="Times New Roman" fo:font-size="14pt" fo:letter-spacing="normal" fo:font-style="normal" fo:text-shadow="none" fo:font-weight="normal" style:font-size-asian="14pt" style:font-style-asian="normal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">Функциональные требования </text:span></text:span><text:span text:style-name="T1">подразделяются на несколько групп. Первая группа — управление фондом. Она предполагает ведение единого электронного каталога изданий, включающего книги, журналы и электронные ресурсы. Система должна обеспечивать регистрацию поступлений с возможностью массовой загрузки данных из внешних источников. Для каждого экземпляра предусматривается уникальный инвентарный номер и статус, а также поддержка операций списания или пометки экземпляра как утерянного или повреждённого.</text:span></text:p>
      <text:p text:style-name="P11" loext:marker-style-name="T1"><text:span text:style-name="T1">Вторая группа требований касается обслуживания читателей. Система ведёт базу читателей с их персональными данными и статусами (активен или заблокирован). Регистрация выдачи и возврата поддерживает несколько экземпляров одновременно и типовые сроки пользования. Автоматически контролируется предельное количество книг, которые читатель может держать одновременно, а также фиксируются просрочки. На основе этих данных система </text:span><text:span text:style-name="T2">рассчитывает</text:span><text:span text:style-name="T1"> и учитывает штрафы с возможностью их погашения. Кроме того, читатель или библиотекарь могут оформить бронирование экземпляра или продлить срок пользования — при этом система автоматически проверяет все ограничения. Поиск по каталогу реализуется по автору, названию, теме, ключевым словам, шифру или ISBN.</text:span></text:p>
      <text:p text:style-name="P11" loext:marker-style-name="T1"><text:span text:style-name="T1">Третья группа — отчёты и аналитика. Система формирует отчёты по фонду (количество, структура, списания), по обороту (выдачи за период, наиболее читаемые издания, активность читателей) и по задолженностям (список должников, размер штрафов). Все отчёты могут быть выгружены в стандартные форматы CSV, Excel или PDF. Четвёртая группа — администрирование. Она предусматривает многоуровневую систему ролей (администратор, библиотекарь, читатель, руководитель), настройку справочников и детальное журналирование всех действий пользователей.</text:span></text:p>
      <text:p text:style-name="P11"><text:span text:style-name="Strong_20_Emphasis"><text:span text:style-name="T1">Нефункциональные требования </text:span></text:span><text:span text:style-name="T1">структурированы в соответствии с ГОСТ 34.602-2020. Требования к надёжности включают ведение журналов транзакций, механизмы резервного копирования и восстановления базы </text:span><text:soft-page-break/><text:span text:style-name="T1">данных, а также корректную обработку ошибочных ситуаций с обязательным информированием пользователя. Производительность регламентирует время отклика при основных операциях (поиск, выдача, возврат) оно не должно превышать заданного числа секунд при определённой расчётной нагрузке.</text:span></text:p>
      <text:p text:style-name="P11"><text:span text:style-name="T1">Масштабируемость и переносимость обеспечиваются возможностью развёртывания системы в локальной сети учреждения и поддержкой выбранной СУБД и операционной системы. Безопасность предполагает аутентификацию пользователей, строгое разграничение прав доступа, хранение и обработку персональных данных в соответствии с законодательством, а также шифрование паролей и организацию защищённого доступа к серверу. Удобство использования (эргономика) означает простые и интуитивные интерфейсы для всех ролей, поддержку «горячих клавиш» для массовых операций и понятные сообщения об ошибках. Наконец, сопровождение и документированность требуют наличия актуальной пользовательской и администраторской документации, а также системы логов для анализа и устранения возможных ошибо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22:51:22.130406893</meta:creation-date>
    <dc:date>2026-05-07T04:18:23.945657048</dc:date>
    <meta:editing-duration>PT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" meta:word-count="351" meta:character-count="3015" meta:non-whitespace-character-count="2665"/>
  </office:meta>
</office:document-meta>
</file>